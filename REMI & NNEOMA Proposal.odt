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Consolas" svg:font-family="Consolas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style:page-number="auto"/>
    </style:style>
    <style:style style:name="P2" style:family="paragraph" style:parent-style-name="Compact" style:list-style-name="WWNum1001"/>
    <style:style style:name="P3" style:family="paragraph" style:parent-style-name="Compact" style:list-style-name="WWNum1002"/>
    <style:style style:name="P4" style:family="paragraph" style:parent-style-name="Compact" style:list-style-name="WWNum1003"/>
    <style:style style:name="P5" style:family="paragraph" style:parent-style-name="Compact" style:list-style-name="WWNum1004"/>
    <style:style style:name="P6" style:family="paragraph" style:parent-style-name="Compact" style:list-style-name="WWNum1005"/>
    <style:style style:name="P7" style:family="paragraph" style:parent-style-name="Compact" style:list-style-name="WWNum1006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275527769880381172" text:style-name="Outline">
        <text:list-item>
          <text:h text:style-name="P1" text:outline-level="1"><text:line-break/><text:line-break/> <text:s text:c="3"/><text:bookmark-start text:name="remi-nneoma"/><text:line-break/> <text:s text:c="3"/>REMI &amp; NNEOMA</text:h>
          <text:list>
            <text:list-item>
              <text:h text:style-name="Heading_20_2" text:outline-level="2"><text:line-break/> <text:s text:c="3"/><text:bookmark-start text:name="Xfcf4608d45f6ffa809d0afedb824b43e960c1de"/><text:line-break/> <text:s text:c="3"/>COMMERCIAL WEBSITE LAUNCH, SECURITY &amp; PLATFORM MANAGEMENT PROPOSAL</text:h>
              <text:list>
                <text:list-item>
                  <text:h text:style-name="Heading_20_3" text:outline-level="3"><text:line-break/> <text:s text:c="3"/><text:bookmark-start text:name="project-completion-status"/><text:line-break/> <text:s text:c="3"/>Project Completion Status</text:h>
                </text:list-item>
              </text:list>
            </text:list-item>
          </text:list>
        </text:list-item>
      </text:list>
      <text:p text:style-name="First_20_Paragraph"><text:line-break/> <text:s text:c="3"/>The REMI &amp; NNEOMA website design and frontend development have been successfully completed.</text:p>
      <text:p text:style-name="Text_20_body"><text:line-break/> <text:s text:c="3"/>The next stage involves preparing the platform for commercial operation, public traffic, customer transactions, and long-term business continuity.</text:p>
      <text:p text:style-name="Text_20_body"><text:line-break/> <text:s text:c="3"/>As the website will be handling public visitors, ticket sales, customer information, and online transactions, additional infrastructure, security, deployment, monitoring, and maintenance services are required before launch.</text:p>
      <text:p text:style-name="Standard"><text:line-break/> <text:s text:c="3"/></text:p>
      <text:list xml:id="list35588168" text:continue-numbering="true" text:style-name="Outline">
        <text:list-item>
          <text:h text:style-name="Heading_20_1" text:outline-level="1"><text:soft-page-break/><text:line-break/> <text:s text:c="3"/><text:bookmark-end text:name="project-completion-status"/><text:line-break/> <text:s text:c="3"/><text:bookmark-end text:name="Xfcf4608d45f6ffa809d0afedb824b43e960c1de"/><text:line-break/> <text:s text:c="3"/><text:bookmark-end text:name="remi-nneoma"/><text:line-break/> <text:s text:c="3"/><text:bookmark-start text:name="website-security-revenue-protection"/><text:line-break/> <text:s text:c="3"/>WEBSITE SECURITY &amp; REVENUE PROTECTION</text:h>
        </text:list-item>
      </text:list>
      <text:p text:style-name="First_20_Paragraph"><text:line-break/> <text:s text:c="3"/>A movie ticketing platform is a revenue-generating asset. Security measures are required to protect customer information, payment transactions, website integrity, and business reputation.</text:p>
      <text:list xml:id="list35581057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line-break/> <text:s text:c="3"/><text:bookmark-start text:name="services-included"/><text:line-break/> <text:s text:c="3"/>Services Included</text:h>
                </text:list-item>
              </text:list>
            </text:list-item>
          </text:list>
        </text:list-item>
      </text:list>
      <text:list xml:id="list7489464735214124369" text:style-name="WWNum1001">
        <text:list-item>
          <text:p text:style-name="P2"><text:line-break/> <text:s text:c="3"/>Enterprise SSL Security Implementation</text:p>
        </text:list-item>
        <text:list-item>
          <text:p text:style-name="P2"><text:line-break/> <text:s text:c="3"/>Website Security Hardening</text:p>
        </text:list-item>
        <text:list-item>
          <text:p text:style-name="P2"><text:line-break/> <text:s text:c="3"/>Web Application Firewall Configuration</text:p>
        </text:list-item>
        <text:list-item>
          <text:p text:style-name="P2"><text:line-break/> <text:s text:c="3"/>Malware &amp; Threat Protection</text:p>
        </text:list-item>
        <text:list-item>
          <text:p text:style-name="P2"><text:line-break/> <text:s text:c="3"/>Bot Attack Prevention</text:p>
        </text:list-item>
        <text:list-item>
          <text:p text:style-name="P2"><text:line-break/> <text:s text:c="3"/>Administrative Access Protection</text:p>
        </text:list-item>
        <text:list-item>
          <text:p text:style-name="P2"><text:line-break/> <text:s text:c="3"/>Security Monitoring &amp; Alert Systems</text:p>
        </text:list-item>
        <text:list-item>
          <text:p text:style-name="P2"><text:line-break/> <text:s text:c="3"/>Backup &amp; Recovery Infrastructure</text:p>
        </text:list-item>
        <text:list-item>
          <text:p text:style-name="P2"><text:line-break/> <text:s text:c="3"/>Data Protection Configuration</text:p>
        </text:list-item>
        <text:list-item>
          <text:p text:style-name="P2"><text:line-break/> <text:s text:c="3"/>Website Vulnerability Assessment</text:p>
        </text:list-item>
      </text:list>
      <text:p text:style-name="First_20_Paragraph"><text:line-break/> <text:s text:c="3"/>Investment: ₦650,000</text:p>
      <text:p text:style-name="Standard"><text:soft-page-break/><text:line-break/> <text:s text:c="3"/></text:p>
      <text:list xml:id="list35596981" text:continue-list="list35581057" text:style-name="Outline">
        <text:list-item>
          <text:h text:style-name="Heading_20_1" text:outline-level="1"><text:line-break/> <text:s text:c="3"/><text:bookmark-end text:name="services-included"/><text:line-break/> <text:s text:c="3"/><text:bookmark-end text:name="website-security-revenue-protection"/><text:line-break/> <text:s text:c="3"/><text:bookmark-start text:name="X53ea01f25dbc6173881e98b0f1260ba801524c5"/><text:line-break/> <text:s text:c="3"/>SERVER INFRASTRUCTURE &amp; PERFORMANCE OPTIMIZATION</text:h>
        </text:list-item>
      </text:list>
      <text:p text:style-name="First_20_Paragraph"><text:line-break/> <text:s text:c="3"/>To ensure visitors can access the website quickly and reliably during marketing campaigns, ticket launches, and traffic spikes.</text:p>
      <text:list xml:id="list35592816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line-break/> <text:s text:c="3"/><text:bookmark-start text:name="services-included-1"/><text:line-break/> <text:s text:c="3"/>Services Included</text:h>
                </text:list-item>
              </text:list>
            </text:list-item>
          </text:list>
        </text:list-item>
      </text:list>
      <text:list xml:id="list8944936630821915692" text:style-name="WWNum1002">
        <text:list-item>
          <text:p text:style-name="P3"><text:line-break/> <text:s text:c="3"/>Production Server Configuration</text:p>
        </text:list-item>
        <text:list-item>
          <text:p text:style-name="P3"><text:line-break/> <text:s text:c="3"/>Performance Optimization</text:p>
        </text:list-item>
        <text:list-item>
          <text:p text:style-name="P3"><text:line-break/> <text:s text:c="3"/>Database Optimization</text:p>
        </text:list-item>
        <text:list-item>
          <text:p text:style-name="P3"><text:line-break/> <text:s text:c="3"/>Hosting Infrastructure Setup</text:p>
        </text:list-item>
        <text:list-item>
          <text:p text:style-name="P3"><text:line-break/> <text:s text:c="3"/>DNS &amp; Domain Configuration</text:p>
        </text:list-item>
        <text:list-item>
          <text:p text:style-name="P3"><text:line-break/> <text:s text:c="3"/>Website Speed Optimization</text:p>
        </text:list-item>
        <text:list-item>
          <text:p text:style-name="P3"><text:line-break/> <text:s text:c="3"/>Resource Monitoring Configuration</text:p>
        </text:list-item>
        <text:list-item>
          <text:p text:style-name="P3"><text:line-break/> <text:s text:c="3"/>Uptime Monitoring Systems</text:p>
        </text:list-item>
      </text:list>
      <text:p text:style-name="First_20_Paragraph"><text:line-break/> <text:s text:c="3"/>Investment: ₦400,000</text:p>
      <text:p text:style-name="Standard"><text:line-break/> <text:s text:c="3"/></text:p>
      <text:list xml:id="list35572588" text:continue-list="list35592816" text:style-name="Outline">
        <text:list-item>
          <text:h text:style-name="Heading_20_1" text:outline-level="1"><text:soft-page-break/><text:line-break/> <text:s text:c="3"/><text:bookmark-end text:name="services-included-1"/><text:line-break/> <text:s text:c="3"/><text:bookmark-end text:name="X53ea01f25dbc6173881e98b0f1260ba801524c5"/><text:line-break/> <text:s text:c="3"/><text:bookmark-start text:name="commercial-deployment-quality-assurance"/><text:line-break/> <text:s text:c="3"/>COMMERCIAL DEPLOYMENT &amp; QUALITY ASSURANCE</text:h>
        </text:list-item>
      </text:list>
      <text:p text:style-name="First_20_Paragraph"><text:line-break/> <text:s text:c="3"/>This phase ensures that all website systems function correctly before being released to the public.</text:p>
      <text:list xml:id="list35584605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line-break/> <text:s text:c="3"/><text:bookmark-start text:name="services-included-2"/><text:line-break/> <text:s text:c="3"/>Services Included</text:h>
                </text:list-item>
              </text:list>
            </text:list-item>
          </text:list>
        </text:list-item>
      </text:list>
      <text:list xml:id="list3897932619383197122" text:style-name="WWNum1003">
        <text:list-item>
          <text:p text:style-name="P4"><text:line-break/> <text:s text:c="3"/>Live Environment Deployment</text:p>
        </text:list-item>
        <text:list-item>
          <text:p text:style-name="P4"><text:line-break/> <text:s text:c="3"/>End-to-End Purchase Flow Testing</text:p>
        </text:list-item>
        <text:list-item>
          <text:p text:style-name="P4"><text:line-break/> <text:s text:c="3"/>Mobile Device Testing</text:p>
        </text:list-item>
        <text:list-item>
          <text:p text:style-name="P4"><text:line-break/> <text:s text:c="3"/>Browser Compatibility Testing</text:p>
        </text:list-item>
        <text:list-item>
          <text:p text:style-name="P4"><text:line-break/> <text:s text:c="3"/>Error Detection &amp; Resolution</text:p>
        </text:list-item>
        <text:list-item>
          <text:p text:style-name="P4"><text:line-break/> <text:s text:c="3"/>User Experience Validation</text:p>
        </text:list-item>
        <text:list-item>
          <text:p text:style-name="P4"><text:line-break/> <text:s text:c="3"/>Website Launch Management</text:p>
        </text:list-item>
      </text:list>
      <text:p text:style-name="First_20_Paragraph"><text:line-break/> <text:s text:c="3"/>Investment: ₦350,000</text:p>
      <text:p text:style-name="Standard"><text:line-break/> <text:s text:c="3"/></text:p>
      <text:list xml:id="list35594377" text:continue-list="list35584605" text:style-name="Outline">
        <text:list-item>
          <text:h text:style-name="Heading_20_1" text:outline-level="1"><text:soft-page-break/><text:line-break/> <text:s text:c="3"/><text:bookmark-end text:name="services-included-2"/><text:line-break/> <text:s text:c="3"/><text:bookmark-end text:name="commercial-deployment-quality-assurance"/><text:line-break/> <text:s text:c="3"/><text:bookmark-start text:name="business-continuity-backup-management"/><text:line-break/> <text:s text:c="3"/>BUSINESS CONTINUITY &amp; BACKUP MANAGEMENT</text:h>
        </text:list-item>
      </text:list>
      <text:p text:style-name="First_20_Paragraph"><text:line-break/> <text:s text:c="3"/>To ensure uninterrupted service and rapid recovery in the event of technical issues.</text:p>
      <text:list xml:id="list35580675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line-break/> <text:s text:c="3"/><text:bookmark-start text:name="services-included-3"/><text:line-break/> <text:s text:c="3"/>Services Included</text:h>
                </text:list-item>
              </text:list>
            </text:list-item>
          </text:list>
        </text:list-item>
      </text:list>
      <text:list xml:id="list6367635959282367078" text:style-name="WWNum1004">
        <text:list-item>
          <text:p text:style-name="P5"><text:line-break/> <text:s text:c="3"/>Automated Backup Configuration</text:p>
        </text:list-item>
        <text:list-item>
          <text:p text:style-name="P5"><text:line-break/> <text:s text:c="3"/>Recovery Infrastructure Setup</text:p>
        </text:list-item>
        <text:list-item>
          <text:p text:style-name="P5"><text:line-break/> <text:s text:c="3"/>Database Backup Scheduling</text:p>
        </text:list-item>
        <text:list-item>
          <text:p text:style-name="P5"><text:line-break/> <text:s text:c="3"/>Disaster Recovery Planning</text:p>
        </text:list-item>
        <text:list-item>
          <text:p text:style-name="P5"><text:line-break/> <text:s text:c="3"/>System Health Monitoring</text:p>
        </text:list-item>
      </text:list>
      <text:p text:style-name="First_20_Paragraph"><text:line-break/> <text:s text:c="3"/>Investment: ₦200,000</text:p>
      <text:p text:style-name="Standard"><text:line-break/> <text:s text:c="3"/></text:p>
      <text:list xml:id="list35590871" text:continue-list="list35580675" text:style-name="Outline">
        <text:list-item>
          <text:h text:style-name="Heading_20_1" text:outline-level="1"><text:soft-page-break/><text:line-break/> <text:s text:c="3"/><text:bookmark-end text:name="services-included-3"/><text:line-break/> <text:s text:c="3"/><text:bookmark-end text:name="business-continuity-backup-management"/><text:line-break/> <text:s text:c="3"/><text:bookmark-start text:name="project-management-technical-support"/><text:line-break/> <text:s text:c="3"/>PROJECT MANAGEMENT &amp; TECHNICAL SUPPORT</text:h>
          <text:list>
            <text:list-item>
              <text:list>
                <text:list-item>
                  <text:h text:style-name="Heading_20_3" text:outline-level="3"><text:line-break/> <text:s text:c="3"/><text:bookmark-start text:name="services-included-4"/><text:line-break/> <text:s text:c="3"/>Services Included</text:h>
                </text:list-item>
              </text:list>
            </text:list-item>
          </text:list>
        </text:list-item>
      </text:list>
      <text:list xml:id="list120735953777079227" text:style-name="WWNum1005">
        <text:list-item>
          <text:p text:style-name="P6"><text:line-break/> <text:s text:c="3"/>Technical Consultation</text:p>
        </text:list-item>
        <text:list-item>
          <text:p text:style-name="P6"><text:line-break/> <text:s text:c="3"/>Launch Coordination</text:p>
        </text:list-item>
        <text:list-item>
          <text:p text:style-name="P6"><text:line-break/> <text:s text:c="3"/>Platform Monitoring During Launch Period</text:p>
        </text:list-item>
        <text:list-item>
          <text:p text:style-name="P6"><text:line-break/> <text:s text:c="3"/>Technical Documentation</text:p>
        </text:list-item>
        <text:list-item>
          <text:p text:style-name="P6"><text:line-break/> <text:s text:c="3"/>Stakeholder Support</text:p>
        </text:list-item>
      </text:list>
      <text:p text:style-name="First_20_Paragraph"><text:line-break/> <text:s text:c="3"/>Investment: ₦250,000</text:p>
      <text:p text:style-name="Standard"><text:line-break/> <text:s text:c="3"/></text:p>
      <text:list xml:id="list35588868" text:continue-list="list35590871" text:style-name="Outline">
        <text:list-item>
          <text:h text:style-name="Heading_20_1" text:outline-level="1"><text:line-break/> <text:s text:c="3"/><text:bookmark-end text:name="services-included-4"/><text:line-break/> <text:s text:c="3"/><text:bookmark-end text:name="project-management-technical-support"/><text:line-break/> <text:s text:c="3"/><text:bookmark-start text:name="total-project-investment"/><text:line-break/> <text:s text:c="3"/>TOTAL PROJECT INVESTMENT</text:h>
          <text:list>
            <text:list-item>
              <text:list>
                <text:list-item>
                  <text:h text:style-name="Heading_20_3" text:outline-level="3"><text:line-break/> <text:s text:c="3"/><text:bookmark-start text:name="section"/><text:line-break/> <text:s text:c="3"/>₦1,850,000</text:h>
                </text:list-item>
              </text:list>
            </text:list-item>
          </text:list>
        </text:list-item>
      </text:list>
      <text:p text:style-name="Standard"><text:line-break/> <text:s text:c="3"/></text:p>
      <text:list xml:id="list35586867" text:continue-numbering="true" text:style-name="Outline">
        <text:list-item>
          <text:h text:style-name="Heading_20_1" text:outline-level="1"><text:soft-page-break/><text:line-break/> <text:s text:c="3"/><text:bookmark-end text:name="section"/><text:line-break/> <text:s text:c="3"/><text:bookmark-end text:name="total-project-investment"/><text:line-break/> <text:s text:c="3"/><text:bookmark-start text:name="monthly-website-management-maintenance"/><text:line-break/> <text:s text:c="3"/>MONTHLY WEBSITE MANAGEMENT &amp; MAINTENANCE</text:h>
        </text:list-item>
      </text:list>
      <text:p text:style-name="First_20_Paragraph"><text:line-break/> <text:s text:c="3"/>Following launch, ongoing maintenance is recommended to maintain security, uptime, and platform performance.</text:p>
      <text:list xml:id="list35596655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line-break/> <text:s text:c="3"/><text:bookmark-start text:name="monthly-services"/><text:line-break/> <text:s text:c="3"/>Monthly Services</text:h>
                </text:list-item>
              </text:list>
            </text:list-item>
          </text:list>
        </text:list-item>
      </text:list>
      <text:list xml:id="list3250736054313628688" text:style-name="WWNum1006">
        <text:list-item>
          <text:p text:style-name="P7"><text:line-break/> <text:s text:c="3"/>Security Monitoring</text:p>
        </text:list-item>
        <text:list-item>
          <text:p text:style-name="P7"><text:line-break/> <text:s text:c="3"/>Software &amp; Security Updates</text:p>
        </text:list-item>
        <text:list-item>
          <text:p text:style-name="P7"><text:line-break/> <text:s text:c="3"/>Website Performance Monitoring</text:p>
        </text:list-item>
        <text:list-item>
          <text:p text:style-name="P7"><text:line-break/> <text:s text:c="3"/>Technical Support</text:p>
        </text:list-item>
        <text:list-item>
          <text:p text:style-name="P7"><text:line-break/> <text:s text:c="3"/>Backup Verification</text:p>
        </text:list-item>
        <text:list-item>
          <text:p text:style-name="P7"><text:line-break/> <text:s text:c="3"/>Bug Fixes</text:p>
        </text:list-item>
        <text:list-item>
          <text:p text:style-name="P7"><text:line-break/> <text:s text:c="3"/>Uptime Monitoring</text:p>
        </text:list-item>
        <text:list-item>
          <text:p text:style-name="P7"><text:line-break/> <text:s text:c="3"/>Routine Health Checks</text:p>
        </text:list-item>
        <text:list-item>
          <text:p text:style-name="P7"><text:line-break/> <text:s text:c="3"/>Ticketing Platform Monitoring</text:p>
        </text:list-item>
      </text:list>
      <text:list xml:id="list35600271" text:continue-list="list35596655" text:style-name="Outline">
        <text:list-item>
          <text:list>
            <text:list-item>
              <text:list>
                <text:list-item>
                  <text:h text:style-name="Heading_20_3" text:outline-level="3"><text:line-break/> <text:s text:c="3"/><text:bookmark-end text:name="monthly-services"/><text:line-break/> <text:s text:c="3"/><text:bookmark-start text:name="monthly-retainer"/><text:line-break/> <text:s text:c="3"/>Monthly Retainer</text:h>
                </text:list-item>
              </text:list>
            </text:list-item>
          </text:list>
        </text:list-item>
      </text:list>
      <text:p text:style-name="First_20_Paragraph"><text:line-break/> <text:s text:c="3"/>₦250,000 / Month</text:p>
      <text:p text:style-name="Standard"><text:soft-page-break/><text:line-break/> <text:s text:c="3"/></text:p>
      <text:list xml:id="list35603239" text:continue-numbering="true" text:style-name="Outline">
        <text:list-item>
          <text:h text:style-name="Heading_20_1" text:outline-level="1"><text:line-break/> <text:s text:c="3"/><text:bookmark-end text:name="monthly-retainer"/><text:line-break/> <text:s text:c="3"/><text:bookmark-end text:name="monthly-website-management-maintenance"/><text:line-break/> <text:s text:c="3"/><text:bookmark-start text:name="client-approval"/><text:line-break/> <text:s text:c="3"/>CLIENT APPROVAL</text:h>
        </text:list-item>
      </text:list>
      <text:p text:style-name="First_20_Paragraph"><text:line-break/> <text:s text:c="3"/>Project: REMI &amp; NNEOMA</text:p>
      <text:p text:style-name="Text_20_body"><text:line-break/> <text:s text:c="3"/>Total Investment: ₦1,850,000</text:p>
      <text:p text:style-name="Text_20_body"><text:line-break/> <text:s text:c="3"/>Monthly Maintenance: ₦250,000 / Month</text:p>
      <text:p text:style-name="Text_20_body"><text:line-break/> <text:s text:c="3"/>Client Representative: _______________________</text:p>
      <text:p text:style-name="Text_20_body"><text:line-break/> <text:s text:c="3"/>Signature: _______________________</text:p>
      <text:p text:style-name="Text_20_body"><text:line-break/> <text:s text:c="3"/>Date: _______________________</text:p>
      <text:p text:style-name="Text_20_body"><text:line-break/> <text:s text:c="3"/>Developer: __ZANE OLOWOKANDE_____________________</text:p>
      <text:p text:style-name="Text_20_body"><text:line-break/> <text:s text:c="3"/>Signature: _______________________</text:p>
      <text:p text:style-name="Text_20_body"><text:line-break/> <text:s text:c="3"/>Date: __08 – JUNE - 2026_____________________</text:p>
      <text:p text:style-name="Standard"><text:line-break/> <text:s text:c="3"/><text:bookmark-end text:name="client-approval"/><text:line-break/> <text:s text:c="3"/><text:line-break/>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Consolas" svg:font-family="Consolas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margin-top="0cm" fo:margin-bottom="0.353cm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ptos" fo:font-size="12pt" fo:language="en" fo:country="US" style:font-name-asian="SimSun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.318cm" fo:margin-bottom="0.318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default-outline-level="" style:list-style-name="" style:class="extra">
      <style:paragraph-properties fo:margin-top="0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First_20_Paragraph" style:display-name="First Paragraph" style:family="paragraph" style:parent-style-name="Text_20_body" style:default-outline-level="" style:list-style-name=""/>
    <style:style style:name="Compact" style:family="paragraph" style:parent-style-name="Text_20_body" style:default-outline-level="" style:list-style-name="">
      <style:paragraph-properties fo:margin-top="0.064cm" fo:margin-bottom="0.064cm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141cm" fo:line-height="100%" fo:text-align="center" style:justify-single-word="false"/>
      <style:text-properties style:font-name="Aptos Display" fo:font-size="28pt" fo:letter-spacing="-0.018cm" fo:font-weight="bold" style:letter-kerning="true" style:font-size-asian="28pt" style:font-weight-asian="bold" style:font-name-complex="F" style:font-size-complex="28pt" style:font-weight-complex="bold"/>
    </style:style>
    <style:style style:name="Subtitle" style:family="paragraph" style:parent-style-name="Title" style:next-style-name="Text_20_body" style:default-outline-level="" style:list-style-name="" style:class="chapter">
      <style:paragraph-properties fo:text-align="start" style:justify-single-word="false"/>
      <style:text-properties fo:font-size="14pt" fo:letter-spacing="0.026cm" fo:font-style="italic" style:font-size-asian="14pt" style:font-style-asian="italic" style:font-name-complex="F" style:font-size-complex="14pt" style:font-style-complex="italic"/>
    </style:style>
    <style:style style:name="Author" style:family="paragraph" style:default-outline-level="" style:list-style-name="">
      <style:paragraph-properties fo:text-align="center" style:justify-single-word="false" fo:keep-together="always" fo:orphans="2" fo:widows="2" fo:keep-with-next="always" style:writing-mode="lr-tb"/>
      <style:text-properties style:use-window-font-color="true"/>
    </style:style>
    <style:style style:name="Date" style:family="paragraph" style:default-outline-level="" style:list-style-name="">
      <style:paragraph-properties fo:text-align="center" style:justify-single-word="false" fo:keep-together="always" fo:orphans="2" fo:widows="2" fo:keep-with-next="always" style:writing-mode="lr-tb"/>
      <style:text-properties style:use-window-font-color="true"/>
    </style:style>
    <style:style style:name="Abstract_20_Title" style:display-name="Abstract Title" style:family="paragraph" style:parent-style-name="Standard" style:default-outline-level="" style:list-style-name="">
      <style:paragraph-properties fo:margin-top="0.529cm" fo:margin-bottom="0cm" fo:text-align="center" style:justify-single-word="false" fo:keep-together="always" fo:keep-with-next="always"/>
      <style:text-properties fo:font-size="10pt" fo:font-weight="bold" style:font-size-asian="10pt" style:font-weight-asian="bold" style:font-size-complex="10pt"/>
    </style:style>
    <style:style style:name="Abstract" style:family="paragraph" style:parent-style-name="Standard" style:default-outline-level="" style:list-style-name="">
      <style:paragraph-properties fo:margin-top="0.176cm" fo:margin-bottom="0.529cm" fo:keep-together="always" fo:keep-with-next="always"/>
      <style:text-properties fo:font-size="10pt" style:font-size-asian="10pt" style:font-size-complex="10pt"/>
    </style:style>
    <style:style style:name="Bibliography" style:family="paragraph" style:parent-style-name="Standard" style:default-outline-level="" style:list-style-name=""/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635cm" fo:margin-bottom="0.141cm" fo:keep-together="always" fo:keep-with-next="always"/>
      <style:text-properties fo:color="#0f4761" style:font-name="Aptos Display" fo:font-size="20pt" style:font-size-asian="20pt" style:font-name-complex="F" style:font-size-complex="20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282cm" fo:margin-bottom="0.141cm" fo:keep-together="always" fo:keep-with-next="always"/>
      <style:text-properties fo:color="#0f4761" style:font-name="Aptos Display" fo:font-size="16pt" style:font-size-asian="16pt" style:font-name-complex="F" style:font-size-complex="16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282cm" fo:margin-bottom="0.141cm" fo:keep-together="always" fo:keep-with-next="always"/>
      <style:text-properties fo:color="#0f4761" fo:font-size="14pt" style:font-size-asian="14pt" style:font-name-complex="F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141cm" fo:margin-bottom="0.071cm" fo:keep-together="always" fo:keep-with-next="always"/>
      <style:text-properties fo:color="#0f4761" fo:font-style="italic" style:font-style-asian="italic" style:font-name-complex="F" style:font-style-complex="italic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141cm" fo:margin-bottom="0.071cm" fo:keep-together="always" fo:keep-with-next="always"/>
      <style:text-properties fo:color="#0f4761" style:font-name-complex="F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071cm" fo:margin-bottom="0cm" fo:keep-together="always" fo:keep-with-next="always"/>
      <style:text-properties fo:color="#595959" fo:font-style="italic" style:font-style-asian="italic" style:font-name-complex="F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071cm" fo:margin-bottom="0cm" fo:keep-together="always" fo:keep-with-next="always"/>
      <style:text-properties fo:color="#595959" style:font-name-complex="F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cm" fo:margin-bottom="0cm" fo:keep-together="always" fo:keep-with-next="always"/>
      <style:text-properties fo:color="#272727" fo:font-style="italic" style:font-style-asian="italic" style:font-name-complex="F" style:font-style-complex="italic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cm" fo:margin-bottom="0cm" fo:keep-together="always" fo:keep-with-next="always"/>
      <style:text-properties fo:color="#272727" style:font-name-complex="F"/>
    </style:style>
    <style:style style:name="Block_20_Text" style:display-name="Block Text" style:family="paragraph" style:parent-style-name="Text_20_body" style:default-outline-level="" style:list-style-name="">
      <style:paragraph-properties fo:margin-left="0.847cm" fo:margin-right="0.847cm" fo:margin-top="0.176cm" fo:margin-bottom="0.176cm" fo:text-indent="0cm" style:auto-text-indent="false"/>
    </style:style>
    <style:style style:name="Footnote" style:family="paragraph" style:parent-style-name="Standard" style:default-outline-level="" style:list-style-name="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note_20_Block_20_Text" style:display-name="Footnote Block Text" style:family="paragraph" style:parent-style-name="Footnote" style:default-outline-level="" style:list-style-name="">
      <style:paragraph-properties fo:margin-left="0.847cm" fo:margin-right="0.847cm" fo:margin-top="0.176cm" fo:margin-bottom="0.176cm" fo:text-indent="0cm" style:auto-text-indent="false"/>
    </style:style>
    <style:style style:name="Definition_20_Term" style:display-name="Definition Term" style:family="paragraph" style:parent-style-name="Standard" style:default-outline-level="" style:list-style-name="">
      <style:paragraph-properties fo:margin-top="0cm" fo:margin-bottom="0cm" fo:keep-together="always" fo:keep-with-next="always"/>
      <style:text-properties fo:font-weight="bold" style:font-weight-asian="bold"/>
    </style:style>
    <style:style style:name="Definition" style:family="paragraph" style:parent-style-name="Standard" style:default-outline-level="" style:list-style-name=""/>
    <style:style style:name="Table_20_Caption" style:display-name="Table Caption" style:family="paragraph" style:parent-style-name="Caption" style:default-outline-level="" style:list-style-name="">
      <style:paragraph-properties fo:keep-with-next="always"/>
    </style:style>
    <style:style style:name="Image_20_Caption" style:display-name="Image Caption" style:family="paragraph" style:parent-style-name="Caption" style:default-outline-level="" style:list-style-name=""/>
    <style:style style:name="Figure" style:family="paragraph" style:parent-style-name="Standard" style:default-outline-level="" style:list-style-name=""/>
    <style:style style:name="Captioned_20_Figure" style:display-name="Captioned Figure" style:family="paragraph" style:parent-style-name="Figure" style:default-outline-level="" style:list-style-name="">
      <style:paragraph-properties fo:keep-with-next="always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-top="0.423cm" fo:margin-bottom="0.141cm" fo:line-height="107%" text:number-lines="false" text:line-number="0"/>
      <style:text-properties fo:color="#365f91" style:font-name="Aptos Display" fo:font-size="16pt" fo:font-weight="normal" style:font-size-asian="16pt" style:font-weight-asian="normal" style:font-name-complex="F" style:font-size-complex="16pt" style:font-weight-complex="normal"/>
    </style:style>
    <style:style style:name="Source_20_Code" style:display-name="Source Code" style:family="paragraph" style:parent-style-name="Standard" style:default-outline-level="" style:list-style-name=""/>
    <style:style style:name="Title_20_Char" style:display-name="Title Char" style:family="text">
      <style:text-properties style:font-name="Aptos Display" fo:font-size="28pt" fo:letter-spacing="-0.018cm" style:letter-kerning="true" style:font-size-asian="28pt" style:font-name-complex="F" style:font-size-complex="28pt"/>
    </style:style>
    <style:style style:name="Subtitle_20_Char" style:display-name="Subtitle Char" style:family="text">
      <style:text-properties fo:color="#595959" fo:font-size="14pt" fo:letter-spacing="0.026cm" style:font-size-asian="14pt" style:font-name-complex="F" style:font-size-complex="14pt"/>
    </style:style>
    <style:style style:name="Heading_20_1_20_Char" style:display-name="Heading 1 Char" style:family="text">
      <style:text-properties fo:color="#0f4761" style:font-name="Aptos Display" fo:font-size="20pt" style:font-size-asian="20pt" style:font-name-complex="F" style:font-size-complex="20pt"/>
    </style:style>
    <style:style style:name="Heading_20_2_20_Char" style:display-name="Heading 2 Char" style:family="text">
      <style:text-properties fo:color="#0f4761" style:font-name="Aptos Display" fo:font-size="16pt" style:font-size-asian="16pt" style:font-name-complex="F" style:font-size-complex="16pt"/>
    </style:style>
    <style:style style:name="Heading_20_3_20_Char" style:display-name="Heading 3 Char" style:family="text">
      <style:text-properties fo:color="#0f4761" fo:font-size="14pt" style:font-size-asian="14pt" style:font-name-complex="F" style:font-size-complex="14pt"/>
    </style:style>
    <style:style style:name="Heading_20_4_20_Char" style:display-name="Heading 4 Char" style:family="text">
      <style:text-properties fo:color="#0f4761" fo:font-style="italic" style:font-style-asian="italic" style:font-name-complex="F" style:font-style-complex="italic"/>
    </style:style>
    <style:style style:name="Heading_20_5_20_Char" style:display-name="Heading 5 Char" style:family="text">
      <style:text-properties fo:color="#0f4761" style:font-name-complex="F"/>
    </style:style>
    <style:style style:name="Heading_20_6_20_Char" style:display-name="Heading 6 Char" style:family="text">
      <style:text-properties fo:color="#595959" fo:font-style="italic" style:font-style-asian="italic" style:font-name-complex="F" style:font-style-complex="italic"/>
    </style:style>
    <style:style style:name="Heading_20_7_20_Char" style:display-name="Heading 7 Char" style:family="text">
      <style:text-properties fo:color="#595959" style:font-name-complex="F"/>
    </style:style>
    <style:style style:name="Heading_20_8_20_Char" style:display-name="Heading 8 Char" style:family="text">
      <style:text-properties fo:color="#272727" fo:font-style="italic" style:font-style-asian="italic" style:font-name-complex="F" style:font-style-complex="italic"/>
    </style:style>
    <style:style style:name="Heading_20_9_20_Char" style:display-name="Heading 9 Char" style:family="text">
      <style:text-properties fo:color="#272727" style:font-name-complex="F"/>
    </style:style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size="11pt" style:font-size-asian="11pt"/>
    </style:style>
    <style:style style:name="Section_20_Number" style:display-name="Section Number" style:family="text" style:parent-style-name="Body_20_Text_20_Char"/>
    <style:style style:name="Footnote_20_anchor" style:display-name="Footnote anchor" style:family="text" style:parent-style-name="Body_20_Text_20_Char">
      <style:text-properties style:text-position="super 58%"/>
    </style:style>
    <style:style style:name="Internet_20_link" style:display-name="Internet link" style:family="text" style:parent-style-name="Body_20_Text_20_Char">
      <style:text-properties fo:color="#4f81bd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KeywordTok" style:family="text" style:parent-style-name="Verbatim_20_Char">
      <style:text-properties fo:color="#007020" fo:font-weight="bold" style:font-weight-asian="bold"/>
    </style:style>
    <style:style style:name="DataTypeTok" style:family="text" style:parent-style-name="Verbatim_20_Char">
      <style:text-properties fo:color="#902000"/>
    </style:style>
    <style:style style:name="DecValTok" style:family="text" style:parent-style-name="Verbatim_20_Char">
      <style:text-properties fo:color="#40a070"/>
    </style:style>
    <style:style style:name="BaseNTok" style:family="text" style:parent-style-name="Verbatim_20_Char">
      <style:text-properties fo:color="#40a070"/>
    </style:style>
    <style:style style:name="FloatTok" style:family="text" style:parent-style-name="Verbatim_20_Char">
      <style:text-properties fo:color="#40a070"/>
    </style:style>
    <style:style style:name="ConstantTok" style:family="text" style:parent-style-name="Verbatim_20_Char">
      <style:text-properties fo:color="#880000"/>
    </style:style>
    <style:style style:name="CharTok" style:family="text" style:parent-style-name="Verbatim_20_Char">
      <style:text-properties fo:color="#4070a0"/>
    </style:style>
    <style:style style:name="SpecialCharTok" style:family="text" style:parent-style-name="Verbatim_20_Char">
      <style:text-properties fo:color="#4070a0"/>
    </style:style>
    <style:style style:name="StringTok" style:family="text" style:parent-style-name="Verbatim_20_Char">
      <style:text-properties fo:color="#4070a0"/>
    </style:style>
    <style:style style:name="VerbatimStringTok" style:family="text" style:parent-style-name="Verbatim_20_Char">
      <style:text-properties fo:color="#4070a0"/>
    </style:style>
    <style:style style:name="SpecialStringTok" style:family="text" style:parent-style-name="Verbatim_20_Char">
      <style:text-properties fo:color="#bb6688"/>
    </style:style>
    <style:style style:name="ImportTok" style:family="text" style:parent-style-name="Verbatim_20_Char">
      <style:text-properties fo:color="#008000" fo:font-weight="bold" style:font-weight-asian="bold"/>
    </style:style>
    <style:style style:name="CommentTok" style:family="text" style:parent-style-name="Verbatim_20_Char">
      <style:text-properties fo:color="#60a0b0" fo:font-style="italic" style:font-style-asian="italic"/>
    </style:style>
    <style:style style:name="DocumentationTok" style:family="text" style:parent-style-name="Verbatim_20_Char">
      <style:text-properties fo:color="#ba2121" fo:font-style="italic" style:font-style-asian="italic"/>
    </style:style>
    <style:style style:name="AnnotationTok" style:family="text" style:parent-style-name="Verbatim_20_Char">
      <style:text-properties fo:color="#60a0b0" fo:font-style="italic" fo:font-weight="bold" style:font-style-asian="italic" style:font-weight-asian="bold"/>
    </style:style>
    <style:style style:name="CommentVarTok" style:family="text" style:parent-style-name="Verbatim_20_Char">
      <style:text-properties fo:color="#60a0b0" fo:font-style="italic" fo:font-weight="bold" style:font-style-asian="italic" style:font-weight-asian="bold"/>
    </style:style>
    <style:style style:name="OtherTok" style:family="text" style:parent-style-name="Verbatim_20_Char">
      <style:text-properties fo:color="#007020"/>
    </style:style>
    <style:style style:name="FunctionTok" style:family="text" style:parent-style-name="Verbatim_20_Char">
      <style:text-properties fo:color="#06287e"/>
    </style:style>
    <style:style style:name="VariableTok" style:family="text" style:parent-style-name="Verbatim_20_Char">
      <style:text-properties fo:color="#19177c"/>
    </style:style>
    <style:style style:name="ControlFlowTok" style:family="text" style:parent-style-name="Verbatim_20_Char">
      <style:text-properties fo:color="#007020" fo:font-weight="bold" style:font-weight-asian="bold"/>
    </style:style>
    <style:style style:name="OperatorTok" style:family="text" style:parent-style-name="Verbatim_20_Char">
      <style:text-properties fo:color="#666666"/>
    </style:style>
    <style:style style:name="BuiltInTok" style:family="text" style:parent-style-name="Verbatim_20_Char">
      <style:text-properties fo:color="#008000"/>
    </style:style>
    <style:style style:name="ExtensionTok" style:family="text" style:parent-style-name="Verbatim_20_Char"/>
    <style:style style:name="PreprocessorTok" style:family="text" style:parent-style-name="Verbatim_20_Char">
      <style:text-properties fo:color="#bc7a00"/>
    </style:style>
    <style:style style:name="AttributeTok" style:family="text" style:parent-style-name="Verbatim_20_Char">
      <style:text-properties fo:color="#7d9029"/>
    </style:style>
    <style:style style:name="RegionMarkerTok" style:family="text" style:parent-style-name="Verbatim_20_Char"/>
    <style:style style:name="InformationTok" style:family="text" style:parent-style-name="Verbatim_20_Char">
      <style:text-properties fo:color="#60a0b0" fo:font-style="italic" fo:font-weight="bold" style:font-style-asian="italic" style:font-weight-asian="bold"/>
    </style:style>
    <style:style style:name="WarningTok" style:family="text" style:parent-style-name="Verbatim_20_Char">
      <style:text-properties fo:color="#60a0b0" fo:font-style="italic" fo:font-weight="bold" style:font-style-asian="italic" style:font-weight-asian="bold"/>
    </style:style>
    <style:style style:name="AlertTok" style:family="text" style:parent-style-name="Verbatim_20_Char">
      <style:text-properties fo:color="#ff0000" fo:font-weight="bold" style:font-weight-asian="bold"/>
    </style:style>
    <style:style style:name="ErrorTok" style:family="text" style:parent-style-name="Verbatim_20_Char">
      <style:text-properties fo:color="#ff0000" fo:font-weight="bold" style:font-weight-asian="bold"/>
    </style:style>
    <style:style style:name="NormalTok" style:family="text" style:parent-style-name="Verbatim_20_Char"/>
    <style:style style:name="ListLabel_20_1" style:display-name="ListLabel 1" style:family="text">
      <style:text-properties style:font-name-complex="Symbol1"/>
    </style:style>
    <style:style style:name="ListLabel_20_2" style:display-name="ListLabel 2" style:family="text">
      <style:text-properties style:font-name-complex="Courier New1"/>
    </style:style>
    <style:style style:name="ListLabel_20_3" style:display-name="ListLabel 3" style:family="text">
      <style:text-properties style:font-name-complex="Wingding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000">
      <text:list-level-style-bullet text:level="1" style:num-suffix=" " text:bullet-char=" 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style:num-suffix=" " text:bullet-char=" 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style:num-suffix=" " text:bullet-char=" 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style:num-suffix=" " text:bullet-char=" 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style:num-suffix=" " text:bullet-char=" 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style:num-suffix=" " text:bullet-char=" 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style:num-suffix=" " text:bullet-char=" 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style:num-suffix=" " text:bullet-char=" 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style:num-suffix=" " text:bullet-char=" 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6-06-08T14:28:23</meta:creation-date>
    <dc:date>2026-06-08T15:31:08.56</dc:date>
    <meta:generator>OpenOffice/4.1.13$Win32 OpenOffice.org_project/4113m1$Build-9810</meta:generator>
    <meta:editing-duration>PT6S</meta:editing-duration>
    <meta:document-statistic meta:table-count="0" meta:image-count="0" meta:object-count="0" meta:page-count="8" meta:paragraph-count="95" meta:word-count="424" meta:character-count="388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